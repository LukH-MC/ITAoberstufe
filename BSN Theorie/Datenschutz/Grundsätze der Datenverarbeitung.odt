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Liberation Sans"/>
    </style:style>
    <style:style style:name="P2" style:family="paragraph" style:parent-style-name="Standard">
      <style:text-properties style:font-name="Liberation Sans"/>
    </style:style>
    <style:style style:name="P3" style:family="paragraph" style:parent-style-name="Heading_20_2">
      <style:paragraph-properties fo:break-before="page"/>
      <style:text-properties style:font-name="Liberation Sans"/>
    </style:style>
    <style:style style:name="P4" style:family="paragraph" style:parent-style-name="Heading_20_3">
      <style:paragraph-properties fo:line-height="115%"/>
      <style:text-properties style:font-name="Liberation Sans"/>
    </style:style>
    <style:style style:name="P5" style:family="paragraph" style:parent-style-name="Standard" style:list-style-name="L1">
      <style:paragraph-properties fo:margin-top="0.101cm" fo:margin-bottom="0.101cm" style:contextual-spacing="false" fo:line-height="115%"/>
      <style:text-properties style:font-name="Liberation Sans" officeooo:paragraph-rsid="0007fc06"/>
    </style:style>
    <style:style style:name="P6" style:family="paragraph" style:parent-style-name="Standard" style:list-style-name="L1">
      <style:paragraph-properties fo:margin-top="0.101cm" fo:margin-bottom="0.101cm" style:contextual-spacing="false" fo:line-height="115%"/>
      <style:text-properties style:font-name="Liberation Sans" fo:language="de" fo:country="DE" officeooo:paragraph-rsid="0007fc06"/>
    </style:style>
    <style:style style:name="P7" style:family="paragraph" style:parent-style-name="Standard" style:list-style-name="L2">
      <style:text-properties style:font-name="Liberation Sans"/>
    </style:style>
    <style:style style:name="P8" style:family="paragraph" style:parent-style-name="Text_20_body" style:list-style-name="L3"/>
    <style:style style:name="P9" style:family="paragraph" style:parent-style-name="Text_20_body" style:list-style-name="L3">
      <style:paragraph-properties fo:margin-top="0cm" fo:margin-bottom="0.247cm" style:contextual-spacing="false"/>
    </style:style>
    <style:style style:name="P10" style:family="paragraph" style:parent-style-name="Text_20_body" style:list-style-name="L3">
      <style:paragraph-properties fo:margin-top="0cm" fo:margin-bottom="0.247cm" style:contextual-spacing="false"/>
      <style:text-properties style:font-name="Liberation Sans"/>
    </style:style>
    <style:style style:name="P11" style:family="paragraph" style:parent-style-name="Text_20_body" style:list-style-name="L3">
      <style:text-properties style:font-name="Liberation Sans"/>
    </style:style>
    <style:style style:name="T1" style:family="text">
      <style:text-properties style:font-name="Liberation Sans"/>
    </style:style>
    <style:style style:name="T2" style:family="text">
      <style:text-properties fo:font-style="italic" fo:font-weight="bold" officeooo:rsid="0009516d" style:font-style-asian="italic" style:font-weight-asian="bold" style:font-style-complex="italic" style:font-weight-complex="bold"/>
    </style:style>
    <style:style style:name="T3" style:family="text">
      <style:text-properties officeooo:rsid="000a7aa1"/>
    </style:style>
    <style:style style:name="T4" style:family="text">
      <style:text-properties fo:language="de" fo:country="DE"/>
    </style:style>
    <style:style style:name="T5" style:family="text">
      <style:text-properties fo:language="de" fo:country="DE" officeooo:rsid="000a7aa1"/>
    </style:style>
    <style:style style:name="T6" style:family="text">
      <style:text-properties fo:language="de" fo:country="DE" fo:font-weight="bold" officeooo:rsid="000a7aa1" style:font-weight-asian="bold" style:font-weight-complex="bold"/>
    </style:style>
    <style:style style:name="T7" style:family="text">
      <style:text-properties fo:language="de" fo:country="DE" fo:font-style="italic" fo:font-weight="bold" officeooo:rsid="000a7aa1"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 text:is-list-header="true">Nach Definition der BPB<text:line-break/></text:h>
      <text:list text:style-name="L1">
        <text:list-item>
          <text:p text:style-name="P5">Personenbezogene Daten müssen</text:p>
          <text:list>
            <text:list-item>
              <text:p text:style-name="P6">Personenbezogene Daten müssen „auf rechtmäßige Weise, nach Treu und Glauben und in einer für die betroffene Person nachvollziehbaren Weise verarbeitet werden“. Ohne Transparenz wird die betroffene Person faktisch rechtlos gestellt. Sie kann nur überprüfen, ob die Datenverarbeitung rechtmäßig ist, und ihre Rechte wahrnehmen, wenn sie ihr gegenüber transparent ist.<text:line-break/><text:span text:style-name="T2">Rechtmäßigkeit, Verarbeitung nach Treu und Glauben, Transparenz</text:span></text:p>
            </text:list-item>
            <text:list-item>
              <text:p text:style-name="P6">Personenbezogene Daten müssen „für festgelegte, eindeutige und legitime Zwecke erhoben werden und dürfen nicht in einer mit diesen Zwecken nicht zu vereinbarenden Weise weiterverarbeitet werden“. Diese Zweckbindung soll der betroffenen Person ermöglichen, die sie betreffende Datenverarbeitung entsprechend dem jeweiligen sozialen Kontext selbst zu steuern.<text:line-break/><text:span text:style-name="T2">Zweckbindung</text:span></text:p>
            </text:list-item>
            <text:list-item>
              <text:p text:style-name="P6">Die Datenverarbeitung muss „dem Zweck angemessen und erheblich sowie auf das für die Zwecke der Verarbeitung notwendige Maß beschränkt“ sein. Der Grundsatz der Datenminimierung beschränkt die Datenverarbeitung und damit die Tiefe des Eingriffs in das Grundrecht auf Datenschutz auf das Erforderliche. Damit unterstützt er den Grundsatz der Zweckbindung.<text:line-break/><text:span text:style-name="T2">Datenminimierung</text:span></text:p>
            </text:list-item>
            <text:list-item>
              <text:p text:style-name="P6">Die Datenverarbeitung muss „sachlich richtig und erforderlichenfalls auf dem neuesten Stand sein“. Der Grundsatz der Richtigkeit betrifft die Datenqualität. Unrichtige personenbezogene Daten sollen gelöscht oder berichtigt werden.<text:line-break/><text:span text:style-name="T2">Richtigkeit</text:span></text:p>
            </text:list-item>
            <text:list-item>
              <text:p text:style-name="P6">Personenbezogene Daten müssen „in einer Form gespeichert werden, die die Identifizierung der betroffenen Personen nur so lange ermöglicht, wie es für die Zwecke, für die sie verarbeitet werden, erforderlich ist“. Dieser Grundsatz der Speicherbegrenzung setzt zusammen mit Buchst. c das Ziel der Datenvermeidung um und verbietet eine Datenverarbeitung auf Vorrat.<text:line-break/><text:span text:style-name="T2">Speicherbegrenzung</text:span></text:p>
            </text:list-item>
            <text:list-item>
              <text:p text:style-name="P6">Personenbezogene Daten dürfen nur „in einer Weise verarbeitet werden, die eine angemessene Sicherheit … gewährleistet, einschließlich Schutz vor unbefugter oder unrechtmäßiger Verarbeitung und vor unbeabsichtigtem Verlust, unbeabsichtigter Zerstörung oder unbeabsichtigter Schädigung“.<text:line-break/><text:span text:style-name="T2">Integrität und Vertraulichkeit</text:span></text:p>
            </text:list-item>
          </text:list>
        </text:list-item>
        <text:list-item>
          <text:p text:style-name="P5"><text:span text:style-name="T4">Der Verantwortliche für die Einhaltung der Grundsätze verantwortlich und muss ihre Einhaltung nachweisen können. Er muss aktiv Maßnahmen ergreifen, um die Grundsätze in seinen Datenverarbeitungsvorgängen umzusetzen.<text:line-break/></text:span><text:span text:style-name="T7">Rechenschaftspfilcht</text:span></text:p>
        </text:list-item>
      </text:list>
      <text:p text:style-name="P1"/>
      <text:h text:style-name="P3" text:outline-level="2">Art. 5 DSGVO</text:h>
      <text:p text:style-name="P2">Grundsätze für die Verarbeitung personenbezogener Daten </text:p>
      <text:p text:style-name="P2"/>
      <text:list text:style-name="L2">
        <text:list-item>
          <text:p text:style-name="P7">Personenbezogene Daten müssen</text:p>
        </text:list-item>
      </text:list>
      <text:list text:style-name="L3">
        <text:list-item>
          <text:list>
            <text:list-item>
              <text:p text:style-name="P10">auf rechtmäßige Weise, nach Treu und Glauben und in einer für die betroffene Person nachvollziehbaren Weise verarbeitet werden („Rechtmäßigkeit, Verarbeitung nach Treu und Glauben, Transparenz“);</text:p>
            </text:list-item>
            <text:list-item>
              <text:p text:style-name="P9"><text:span text:style-name="T1">für festgelegte, eindeutige und legitime Zwecke erhoben werden und dürfen nicht in einer mit diesen Zwecken nicht zu vereinbarenden Weise weiterverarbeitet werden; eine Weiterverarbeitung für im öffentlichen Interesse liegende Archivzwecke, für wissenschaftliche oder historische Forschungszwecke oder für statistische Zwecke gilt gemäß </text:span><text:a xlink:type="simple" xlink:href="https://dsgvo-gesetz.de/art-89-dsgvo/" text:style-name="Internet_20_link" text:visited-style-name="Visited_20_Internet_20_Link"><text:span text:style-name="T1">Artikel 89</text:span></text:a><text:span text:style-name="T1"> Absatz 1 nicht als unvereinbar mit den ursprünglichen Zwecken („Zweckbindung“);</text:span></text:p>
            </text:list-item>
            <text:list-item>
              <text:p text:style-name="P10">dem Zweck angemessen und erheblich sowie auf das für die Zwecke der Verarbeitung notwendige Maß beschränkt sein („Datenminimierung“);</text:p>
            </text:list-item>
            <text:list-item>
              <text:p text:style-name="P11">sachlich richtig und erforderlichenfalls auf dem neuesten Stand sein; es sind alle angemessenen Maßnahmen zu treffen, damit personenbezogene Daten, die im Hinblick auf die Zwecke ihrer Verarbeitung unrichtig sind, unverzüglich gelöscht oder berichtigt werden („Richtigkeit“);</text:p>
            </text:list-item>
            <text:list-item>
              <text:p text:style-name="P8"><text:span text:style-name="T1">in einer Form gespeichert werden, die die Identifizierung der betroffenen Personen nur so lange ermöglicht, wie es für die Zwecke, für die sie verarbeitet werden, erforderlich ist; personenbezogene Daten dürfen länger gespeichert werden, soweit die personenbezogenen Daten vorbehaltlich der Durchführung geeigneter technischer und organisatorischer Maßnahmen, die von dieser Verordnung zum Schutz der Rechte und Freiheiten der betroffenen Person gefordert werden, ausschließlich für im öffentlichen Interesse liegende Archivzwecke oder für wissenschaftliche und historische Forschungszwecke oder für statistische Zwecke gemäß </text:span><text:a xlink:type="simple" xlink:href="https://dsgvo-gesetz.de/art-89-dsgvo/" text:style-name="Internet_20_link" text:visited-style-name="Visited_20_Internet_20_Link"><text:span text:style-name="T1">Artikel 89</text:span></text:a><text:span text:style-name="T1"> Absatz 1 verarbeitet werden („Speicherbegrenzung“);</text:span></text:p>
            </text:list-item>
            <text:list-item>
              <text:p text:style-name="P11">in einer Weise verarbeitet werden, die eine angemessene Sicherheit der personenbezogenen Daten gewährleistet, einschließlich Schutz vor unbefugter oder unrechtmäßiger Verarbeitung und vor unbeabsichtigtem Verlust, unbeabsichtigter Zerstörung oder unbeabsichtigter Schädigung durch geeignete technische und organisatorische Maßnahmen („Integrität und Vertraulichkeit“);</text:p>
            </text:list-item>
          </text:list>
        </text:list-item>
        <text:list-item>
          <text:p text:style-name="P11">Der Verantwortliche ist für die Einhaltung des Absatzes 1 verantwortlich und muss dessen Einhaltung nachweisen können („Rechenschaftspflicht“).</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a" style:num-letter-sync="true">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a">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14:20:16.749000000</meta:creation-date>
    <dc:date>2023-11-26T14:48:39.267000000</dc:date>
    <meta:editing-duration>PT24M46S</meta:editing-duration>
    <meta:editing-cycles>3</meta:editing-cycles>
    <meta:generator>LibreOffice/7.6.2.1$Windows_X86_64 LibreOffice_project/56f7684011345957bbf33a7ee678afaf4d2ba333</meta:generator>
    <meta:document-statistic meta:table-count="0" meta:image-count="0" meta:object-count="0" meta:page-count="2" meta:paragraph-count="19" meta:word-count="596" meta:character-count="4755" meta:non-whitespace-character-count="4192"/>
  </office:meta>
</office:document-meta>
</file>